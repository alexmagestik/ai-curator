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table="urn:oasis:names:tc:opendocument:xmlns:table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table="urn:oasis:names:tc:opendocument:xmlns:table:1.0" office:version="1.2">
  <office:automatic-styles/>
  <office:body>
    <office:text>
      <text:p>Модуль 2. Работа с базами данных.</text:p>
      <text:p/>
      <text:p>SQLite — встроенная реляционная СУБД для прототипирования. ORM упрощает работу с таблицами и миграциями.</text:p>
      <text:p/>
      <text:p>Темы: SQL-запросы, индексы, транзакции, SQLAlchemy.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table="urn:oasis:names:tc:opendocument:xmlns:table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table="urn:oasis:names:tc:opendocument:xmlns:table:1.0" office:version="1.2">
  <office:meta>
    <meta:generator>ODFPY/1.4.1</meta:generator>
  </office:meta>
</office:document-meta>
</file>