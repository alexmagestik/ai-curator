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Модуль 1. Введение в Python Backend.</text:p>
      <text:p/>
      <text:p>Python — высокоуровневый язык программирования. Backend-разработка включает создание серверной части приложений, работу с базами данных и REST API.</text:p>
      <text:p/>
      <text:p>Основные темы: переменные, функции, модули, виртуальные окружения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