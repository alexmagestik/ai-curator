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Часто задаваемые вопросы по модулю 1.</text:p>
      <text:p/>
      <text:p>Вопрос: Как установить Python?</text:p>
      <text:p>Ответ: Скачайте дистрибутив с python.org и создайте виртуальное окружение.</text:p>
      <text:p/>
      <text:p>Вопрос: Что такое pip?</text:p>
      <text:p>Ответ: Менеджер пакетов Python для установки зависимостей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