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Модуль 3. RAG и LLM.</text:p>
      <text:p/>
      <text:p>Retrieval-Augmented Generation объединяет поиск по базе знаний и генерацию ответов языковой моделью.</text:p>
      <text:p/>
      <text:p>Компоненты: эмбеддинги, векторное хранилище, retriever, prompt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