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Модуль 2. REST API и FastAPI.</text:p>
      <text:p/>
      <text:p>REST — архитектурный стиль для HTTP-сервисов. FastAPI обеспечивает быструю разработку API с автогенерацией документации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